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0181in" table:align="left"/>
    </style:style>
    <style:style style:name="Table1.A" style:family="table-column">
      <style:table-column-properties style:column-width="0.2896in"/>
    </style:style>
    <style:style style:name="Table1.B" style:family="table-column">
      <style:table-column-properties style:column-width="1.0458in"/>
    </style:style>
    <style:style style:name="Table1.C" style:family="table-column">
      <style:table-column-properties style:column-width="0.6097in"/>
    </style:style>
    <style:style style:name="Table1.D" style:family="table-column">
      <style:table-column-properties style:column-width="2.07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9771in" table:align="left"/>
    </style:style>
    <style:style style:name="Table2.A" style:family="table-column">
      <style:table-column-properties style:column-width="0.5278in"/>
    </style:style>
    <style:style style:name="Table2.B" style:family="table-column">
      <style:table-column-properties style:column-width="1.2139in"/>
    </style:style>
    <style:style style:name="Table2.C" style:family="table-column">
      <style:table-column-properties style:column-width="1.235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able_20_Heading">
      <style:text-properties officeooo:paragraph-rsid="0007ebcf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>
      <style:text-properties officeooo:rsid="0007ebcf" officeooo:paragraph-rsid="0007ebcf"/>
    </style:style>
    <style:style style:name="P21" style:family="paragraph" style:parent-style-name="Text_20_body" style:list-style-name="L1">
      <style:paragraph-properties fo:margin-top="0in" fo:margin-bottom="0in" loext:contextual-spacing="false"/>
    </style:style>
    <style:style style:name="P22" style:family="paragraph" style:parent-style-name="Text_20_body" style:list-style-name="L2">
      <style:paragraph-properties fo:margin-top="0in" fo:margin-bottom="0in" loext:contextual-spacing="false"/>
    </style:style>
    <style:style style:name="P23" style:family="paragraph" style:parent-style-name="Text_20_body" style:list-style-name="L3">
      <style:paragraph-properties fo:margin-top="0in" fo:margin-bottom="0in" loext:contextual-spacing="false"/>
    </style:style>
    <style:style style:name="P24" style:family="paragraph" style:parent-style-name="Text_20_body" style:list-style-name="L4">
      <style:paragraph-properties fo:margin-top="0in" fo:margin-bottom="0in" loext:contextual-spacing="false"/>
    </style:style>
    <style:style style:name="P25" style:family="paragraph" style:parent-style-name="Text_20_body" style:list-style-name="L5">
      <style:paragraph-properties fo:margin-top="0in" fo:margin-bottom="0in" loext:contextual-spacing="false"/>
    </style:style>
    <style:style style:name="P26" style:family="paragraph" style:parent-style-name="Text_20_body" style:list-style-name="L6">
      <style:paragraph-properties fo:margin-top="0in" fo:margin-bottom="0in" loext:contextual-spacing="false"/>
    </style:style>
    <style:style style:name="P27" style:family="paragraph" style:parent-style-name="Text_20_body" style:list-style-name="L7">
      <style:paragraph-properties fo:margin-top="0in" fo:margin-bottom="0in" loext:contextual-spacing="false"/>
    </style:style>
    <style:style style:name="P28" style:family="paragraph" style:parent-style-name="Text_20_body" style:list-style-name="L8">
      <style:paragraph-properties fo:margin-top="0in" fo:margin-bottom="0in" loext:contextual-spacing="false"/>
    </style:style>
    <style:style style:name="P29" style:family="paragraph" style:parent-style-name="Text_20_body" style:list-style-name="L9">
      <style:paragraph-properties fo:margin-top="0in" fo:margin-bottom="0in" loext:contextual-spacing="false"/>
    </style:style>
    <style:style style:name="P30" style:family="paragraph" style:parent-style-name="Text_20_body" style:list-style-name="L10">
      <style:paragraph-properties fo:margin-top="0in" fo:margin-bottom="0in" loext:contextual-spacing="false"/>
    </style:style>
    <style:style style:name="P31" style:family="paragraph" style:parent-style-name="Text_20_body" style:list-style-name="L11">
      <style:paragraph-properties fo:margin-top="0in" fo:margin-bottom="0in" loext:contextual-spacing="false"/>
    </style:style>
    <style:style style:name="P32" style:family="paragraph" style:parent-style-name="Text_20_body" style:list-style-name="L12">
      <style:paragraph-properties fo:margin-top="0in" fo:margin-bottom="0in" loext:contextual-spacing="false"/>
    </style:style>
    <style:style style:name="P33" style:family="paragraph" style:parent-style-name="Text_20_body" style:list-style-name="L13">
      <style:paragraph-properties fo:margin-top="0in" fo:margin-bottom="0in" loext:contextual-spacing="false"/>
    </style:style>
    <style:style style:name="P34" style:family="paragraph" style:parent-style-name="Text_20_body" style:list-style-name="L14">
      <style:paragraph-properties fo:margin-top="0in" fo:margin-bottom="0in" loext:contextual-spacing="false"/>
    </style:style>
    <style:style style:name="P35" style:family="paragraph" style:parent-style-name="Text_20_body" style:list-style-name="L15">
      <style:paragraph-properties fo:margin-top="0in" fo:margin-bottom="0in" loext:contextual-spacing="false"/>
    </style:style>
    <style:style style:name="P36" style:family="paragraph" style:parent-style-name="Text_20_body" style:list-style-name="L16">
      <style:paragraph-properties fo:margin-top="0in" fo:margin-bottom="0in" loext:contextual-spacing="false"/>
    </style:style>
    <style:style style:name="P37" style:family="paragraph" style:parent-style-name="Text_20_body" style:list-style-name="L17">
      <style:paragraph-properties fo:margin-top="0in" fo:margin-bottom="0in" loext:contextual-spacing="false"/>
    </style:style>
    <style:style style:name="P38" style:family="paragraph" style:parent-style-name="Text_20_body" style:list-style-name="L18">
      <style:paragraph-properties fo:margin-top="0in" fo:margin-bottom="0in" loext:contextual-spacing="false"/>
    </style:style>
    <style:style style:name="P39" style:family="paragraph" style:parent-style-name="Text_20_body" style:list-style-name="L19">
      <style:paragraph-properties fo:margin-top="0in" fo:margin-bottom="0in" loext:contextual-spacing="false"/>
    </style:style>
    <style:style style:name="T1" style:family="text">
      <style:text-properties officeooo:rsid="0007ebcf"/>
    </style:style>
    <style:style style:name="T2" style:family="text">
      <style:text-properties style:font-name="Liberation Serif" fo:font-size="24pt" fo:font-weight="bold" officeooo:rsid="0007ebcf" style:font-name-asian="Noto Serif CJK SC" style:font-size-asian="24pt" style:font-weight-asian="bold" style:font-name-complex="Lohit Devanagari" style:font-size-complex="2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MAT <text:span text:style-name="T2">PAPER</text:span> KRIPTOGRAFI</text:h>
      <text:h text:style-name="Heading_20_2" text:outline-level="2"><text:span text:style-name="T1">Contoh </text:span>Judul</text:h>
      <text:p text:style-name="Text_20_body"><text:span text:style-name="Strong_20_Emphasis">IMPLEMENTASI ALGORITMA KRIPTOGRAFI UNTUK KEAMANAN DATA PADA SISTEM INFORMASI</text:span></text:p>
      <text:h text:style-name="Heading_20_1" text:outline-level="1">ABSTRAK</text:h>
      <text:p text:style-name="Text_20_body">Abstrak berisi ringkasan penelitian yang mencakup:</text:p>
      <text:list xml:id="list172061921" text:style-name="L1">
        <text:list-item>
          <text:p text:style-name="P21">latar belakang, tujuan, metode, hasil, kesimpulan. </text:p>
        </text:list-item>
      </text:list>
      <text:h text:style-name="Heading_20_1" text:outline-level="1">1. PENDAHULUAN</text:h>
      <text:h text:style-name="Heading_20_2" text:outline-level="2">1.1 Latar Belakang</text:h>
      <text:p text:style-name="Text_20_body">Berisi:</text:p>
      <text:list xml:id="list4211969960" text:style-name="L2">
        <text:list-item>
          <text:p text:style-name="P22">perkembangan teknologi informasi, </text:p>
        </text:list-item>
        <text:list-item>
          <text:p text:style-name="P22">ancaman keamanan data, </text:p>
        </text:list-item>
        <text:list-item>
          <text:p text:style-name="P3">pentingnya kriptografi. </text:p>
        </text:list-item>
      </text:list>
      <text:h text:style-name="Heading_20_2" text:outline-level="2">1.2 Rumusan Masalah</text:h>
      <text:p text:style-name="Text_20_body">Contoh:</text:p>
      <text:list xml:id="list769973942" text:style-name="L3">
        <text:list-item>
          <text:p text:style-name="P23">Bagaimana implementasi algoritma kriptografi pada sistem informasi? </text:p>
        </text:list-item>
        <text:list-item>
          <text:p text:style-name="P23">Bagaimana tingkat keamanan data setelah diterapkan proses enkripsi? </text:p>
        </text:list-item>
        <text:list-item>
          <text:p text:style-name="P4">Bagaimana performa algoritma kriptografi dalam proses enkripsi dan dekripsi? </text:p>
        </text:list-item>
      </text:list>
      <text:h text:style-name="Heading_20_2" text:outline-level="2">1.3 Tujuan Penelitian</text:h>
      <text:p text:style-name="Text_20_body">Contoh:</text:p>
      <text:list xml:id="list1243616982" text:style-name="L4">
        <text:list-item>
          <text:p text:style-name="P24">Mengimplementasikan algoritma kriptografi pada sistem keamanan data. </text:p>
        </text:list-item>
        <text:list-item>
          <text:p text:style-name="P24">Menganalisis performa algoritma kriptografi. </text:p>
        </text:list-item>
        <text:list-item>
          <text:p text:style-name="P5">Menguji efektivitas enkripsi terhadap keamanan informasi. </text:p>
        </text:list-item>
      </text:list>
      <text:h text:style-name="Heading_20_2" text:outline-level="2">1.4 Manfaat Penelitian</text:h>
      <text:list xml:id="list3725547345" text:style-name="L5">
        <text:list-item>
          <text:p text:style-name="P25">Manfaat akademik </text:p>
        </text:list-item>
        <text:list-item>
          <text:p text:style-name="P6">Manfaat praktis </text:p>
        </text:list-item>
      </text:list>
      <text:p text:style-name="Horizontal_20_Line"/>
      <text:h text:style-name="Heading_20_1" text:outline-level="1"><text:soft-page-break/>2. TINJAUAN PUSTAKA</text:h>
      <text:h text:style-name="Heading_20_2" text:outline-level="2">2.1 Kriptografi</text:h>
      <text:p text:style-name="Text_20_body">Definisi kriptografi:</text:p>
      <text:p text:style-name="Quotations">Ilmu yang mempelajari teknik pengamanan data melalui proses enkripsi dan dekripsi.</text:p>
      <text:h text:style-name="Heading_20_2" text:outline-level="2">2.2 Konsep Dasar Kriptografi</text:h>
      <text:h text:style-name="Heading_20_3" text:outline-level="3">a. Plaintext</text:h>
      <text:p text:style-name="Text_20_body">Data asli sebelum dienkripsi.</text:p>
      <text:h text:style-name="Heading_20_3" text:outline-level="3">b. Ciphertext</text:h>
      <text:p text:style-name="Text_20_body">Data hasil enkripsi.</text:p>
      <text:h text:style-name="Heading_20_3" text:outline-level="3">c. Enkripsi</text:h>
      <text:p text:style-name="Text_20_body">Proses mengubah plaintext menjadi ciphertext.</text:p>
      <text:h text:style-name="Heading_20_3" text:outline-level="3">d. Dekripsi</text:h>
      <text:p text:style-name="Text_20_body">Proses mengembalikan ciphertext menjadi plaintext.</text:p>
      <text:h text:style-name="Heading_20_2" text:outline-level="2">2.3 Jenis Algoritma Kriptografi</text:h>
      <text:h text:style-name="Heading_20_3" text:outline-level="3">a. Kriptografi Simetris</text:h>
      <text:p text:style-name="Text_20_body">Contoh:</text:p>
      <text:list xml:id="list1515429510" text:style-name="L6">
        <text:list-item>
          <text:p text:style-name="P26">AES </text:p>
        </text:list-item>
        <text:list-item>
          <text:p text:style-name="P26">DES </text:p>
        </text:list-item>
        <text:list-item>
          <text:p text:style-name="P7">Blowfish </text:p>
        </text:list-item>
      </text:list>
      <text:h text:style-name="Heading_20_3" text:outline-level="3">b. Kriptografi Asimetris</text:h>
      <text:p text:style-name="Text_20_body">Contoh:</text:p>
      <text:list xml:id="list1678686114" text:style-name="L7">
        <text:list-item>
          <text:p text:style-name="P27">RSA </text:p>
        </text:list-item>
        <text:list-item>
          <text:p text:style-name="P8">ECC </text:p>
        </text:list-item>
      </text:list>
      <text:h text:style-name="Heading_20_3" text:outline-level="3">c. Hash Function</text:h>
      <text:p text:style-name="Text_20_body">Contoh:</text:p>
      <text:list xml:id="list1617304053" text:style-name="L8">
        <text:list-item>
          <text:p text:style-name="P28">SHA-256 </text:p>
        </text:list-item>
        <text:list-item>
          <text:p text:style-name="P9">MD5 </text:p>
        </text:list-item>
      </text:list>
      <text:h text:style-name="Heading_20_2" text:outline-level="2"><text:soft-page-break/>2.4 Penelitian Terdahulu</text:h>
      <text:p text:style-name="Text_20_body">Berisi tabel penelitian sebelumnya.<text:span text:style-name="T1">contoh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139033633296">
            <table:table-cell table:style-name="Table1.A1" office:value-type="string">
              <text:p text:style-name="Table_20_Heading">No</text:p>
            </table:table-cell>
            <table:table-cell table:style-name="Table1.A1" office:value-type="string">
              <text:p text:style-name="Table_20_Heading">Peneliti</text:p>
            </table:table-cell>
            <table:table-cell table:style-name="Table1.A1" office:value-type="string">
              <text:p text:style-name="Table_20_Heading">Metode</text:p>
            </table:table-cell>
            <table:table-cell table:style-name="Table1.A1" office:value-type="string">
              <text:p text:style-name="Table_20_Heading">Hasil</text:p>
            </table:table-cell>
          </table:table-row>
        </table:table-header-rows>
        <table:table-row table:style-name="TableLine94139033633296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hmad (2023)</text:p>
          </table:table-cell>
          <table:table-cell table:style-name="Table1.A1" office:value-type="string">
            <text:p text:style-name="Table_20_Contents">AES</text:p>
          </table:table-cell>
          <table:table-cell table:style-name="Table1.A1" office:value-type="string">
            <text:p text:style-name="Table_20_Contents">Keamanan meningkat</text:p>
          </table:table-cell>
        </table:table-row>
        <table:table-row table:style-name="TableLine94139033633296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Budi (2022)</text:p>
          </table:table-cell>
          <table:table-cell table:style-name="Table1.A1" office:value-type="string">
            <text:p text:style-name="Table_20_Contents">RSA</text:p>
          </table:table-cell>
          <table:table-cell table:style-name="Table1.A1" office:value-type="string">
            <text:p text:style-name="Table_20_Contents">Proses autentikasi lebih aman</text:p>
          </table:table-cell>
        </table:table-row>
      </table:table>
      <text:h text:style-name="Heading_20_1" text:outline-level="1">3. METODOLOGI PENELITIAN</text:h>
      <text:h text:style-name="Heading_20_2" text:outline-level="2">3.1 Metode Penelitian</text:h>
      <text:p text:style-name="Text_20_body">Contoh:<text:line-break/>Penelitian menggunakan metode eksperimen.</text:p>
      <text:h text:style-name="Heading_20_2" text:outline-level="2">3.2 Tahapan Penelitian</text:h>
      <text:list xml:id="list4152815212" text:style-name="L9">
        <text:list-item>
          <text:p text:style-name="P29">Studi literatur </text:p>
        </text:list-item>
        <text:list-item>
          <text:p text:style-name="P29">Perancangan sistem </text:p>
        </text:list-item>
        <text:list-item>
          <text:p text:style-name="P29">Implementasi algoritma </text:p>
        </text:list-item>
        <text:list-item>
          <text:p text:style-name="P29">Pengujian </text:p>
        </text:list-item>
        <text:list-item>
          <text:p text:style-name="P10">Analisis hasil </text:p>
        </text:list-item>
      </text:list>
      <text:h text:style-name="Heading_20_2" text:outline-level="2">3.3 Flowchart Sistem</text:h>
      <text:p text:style-name="Text_20_body">Contoh alur:</text:p>
      <text:list xml:id="list798304774" text:style-name="L10">
        <text:list-item>
          <text:p text:style-name="P30">Input data </text:p>
        </text:list-item>
        <text:list-item>
          <text:p text:style-name="P30">Enkripsi </text:p>
        </text:list-item>
        <text:list-item>
          <text:p text:style-name="P30">Penyimpanan ciphertext </text:p>
        </text:list-item>
        <text:list-item>
          <text:p text:style-name="P30">Dekripsi </text:p>
        </text:list-item>
        <text:list-item>
          <text:p text:style-name="P11">Output plaintext </text:p>
        </text:list-item>
      </text:list>
      <text:h text:style-name="Heading_20_2" text:outline-level="2">3.4 Tools dan Software</text:h>
      <text:p text:style-name="P20"><text:s/>Disesuaikan dengan penelitiannya</text:p>
      <text:h text:style-name="Heading_20_1" text:outline-level="1">4. HASIL DAN PEMBAHASAN</text:h>
      <text:h text:style-name="Heading_20_2" text:outline-level="2">4.1 Implementasi Algoritma</text:h>
      <text:p text:style-name="Text_20_body"><text:span text:style-name="Source_20_Text"/></text:p>
      <text:h text:style-name="Heading_20_2" text:outline-level="2">4.2 Hasil Pengujian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139034070368"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Table_20_Heading"/>
            </table:table-cell>
            <table:table-cell table:style-name="Table2.A1" office:value-type="string">
              <text:p text:style-name="Table_20_Heading"/>
            </table:table-cell>
          </table:table-row>
        </table:table-header-rows>
        <table:table-row table:style-name="TableLine94139034070368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ext:soft-page-break/>
        <table:table-row table:style-name="TableLine94139034070368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Heading_20_2" text:outline-level="2">4.3 Analisis Keamanan</text:h>
      <text:p text:style-name="Text_20_body">Pembahasan: <text:span text:style-name="T1">contoh</text:span></text:p>
      <text:list xml:id="list663892623" text:style-name="L12">
        <text:list-item>
          <text:p text:style-name="P32">kekuatan algoritma, </text:p>
        </text:list-item>
        <text:list-item>
          <text:p text:style-name="P32">kemungkinan serangan, </text:p>
        </text:list-item>
        <text:list-item>
          <text:p text:style-name="P12">efisiensi sistem. </text:p>
        </text:list-item>
      </text:list>
      <text:h text:style-name="Heading_20_1" text:outline-level="1">5. KESIMPULAN DAN SARAN</text:h>
      <text:h text:style-name="Heading_20_2" text:outline-level="2">5.1 Kesimpulan</text:h>
      <text:h text:style-name="Heading_20_2" text:outline-level="2">5.2 Saran</text:h>
      <text:h text:style-name="Heading_20_1" text:outline-level="1">DAFTAR PUSTAKA</text:h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13T05:33:28.114294901</meta:creation-date>
    <dc:date>2026-05-13T05:42:07.017980739</dc:date>
    <meta:editing-duration>PT8M39S</meta:editing-duration>
    <meta:editing-cycles>1</meta:editing-cycles>
    <meta:document-statistic meta:table-count="2" meta:image-count="0" meta:object-count="0" meta:page-count="4" meta:paragraph-count="96" meta:word-count="299" meta:character-count="2133" meta:non-whitespace-character-count="1929"/>
    <meta:generator>LibreOffice/6.4.7.2$Linux_X86_64 LibreOffice_project/40$Build-2</meta:generator>
  </office:meta>
</office:document-meta>
</file>